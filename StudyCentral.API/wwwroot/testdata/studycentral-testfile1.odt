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ef7" officeooo:paragraph-rsid="001bde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yCentral-TestFile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19:01:29.899317700</meta:creation-date>
    <dc:date>2026-06-06T19:01:42.3948511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22" meta:non-whitespace-character-count="22"/>
    <meta:generator>LibreOffice/26.2.0.3$Windows_X86_64 LibreOffice_project/620$Build-3</meta:generator>
  </office:meta>
</office:document-meta>
</file>