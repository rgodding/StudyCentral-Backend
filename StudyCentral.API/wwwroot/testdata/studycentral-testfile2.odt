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ef7" officeooo:paragraph-rsid="001bdef7"/>
    </style:style>
    <style:style style:name="T1" style:family="text">
      <style:text-properties officeooo:rsid="0003f3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yCentral-TestFile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6T19:01:45.991402000</meta:creation-date>
    <dc:date>2026-06-06T19:01:49.0788266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22" meta:non-whitespace-character-count="22"/>
    <meta:generator>LibreOffice/26.2.0.3$Windows_X86_64 LibreOffice_project/620$Build-3</meta:generator>
  </office:meta>
</office:document-meta>
</file>