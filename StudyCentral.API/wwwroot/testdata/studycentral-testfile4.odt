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ef7" officeooo:paragraph-rsid="001bdef7"/>
    </style:style>
    <style:style style:name="T1" style:family="text">
      <style:text-properties officeooo:rsid="00055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yCentral-TestFile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19:01:45.991402000</meta:creation-date>
    <dc:date>2026-06-07T04:54:47.481359800</dc:date>
    <meta:editing-duration>PT7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" meta:paragraph-count="1" meta:word-count="1" meta:character-count="22" meta:non-whitespace-character-count="22"/>
  </office:meta>
</office:document-meta>
</file>